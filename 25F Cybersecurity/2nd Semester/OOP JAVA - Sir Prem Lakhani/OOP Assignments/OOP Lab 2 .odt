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2536651E94D.png" manifest:media-type="image/png"/>
  <manifest:file-entry manifest:full-path="Pictures/100000010000024F00000227E4E06F78.png" manifest:media-type="image/png"/>
  <manifest:file-entry manifest:full-path="Pictures/100000010000024F00000227AB9F8F7F.png" manifest:media-type="image/png"/>
  <manifest:file-entry manifest:full-path="Pictures/100000010000021D0000026C4F82DAC7.png" manifest:media-type="image/png"/>
  <manifest:file-entry manifest:full-path="Pictures/100000010000024F000002278D92DE66.png" manifest:media-type="image/png"/>
  <manifest:file-entry manifest:full-path="Pictures/100000010000020A0000025385A668A5.png" manifest:media-type="image/png"/>
  <manifest:file-entry manifest:full-path="Pictures/100000010000024F00000227DFC22261.png" manifest:media-type="image/png"/>
  <manifest:file-entry manifest:full-path="Pictures/100000010000024F0000022726B598A2.png" manifest:media-type="image/png"/>
  <manifest:file-entry manifest:full-path="Pictures/100000010000024F00000227EDDEF7BB.png" manifest:media-type="image/png"/>
  <manifest:file-entry manifest:full-path="Pictures/100000010000024F00000268A53E623E.png" manifest:media-type="image/png"/>
  <manifest:file-entry manifest:full-path="Pictures/100000010000021D0000026C4DF423E8.png" manifest:media-type="image/png"/>
  <manifest:file-entry manifest:full-path="Pictures/100000010000024F000002685197D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87f5a" officeooo:paragraph-rsid="00087f5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4c2a8" officeooo:paragraph-rsid="0004c2a8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60950" officeooo:paragraph-rsid="00060950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69179" officeooo:paragraph-rsid="00069179" style:font-size-asian="15.75pt" style:font-weight-asian="bold" style:font-size-complex="18pt" style:font-weight-complex="bold"/>
    </style:style>
    <style:style style:name="T1" style:family="text">
      <style:text-properties officeooo:rsid="00087f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Rehan <text:tab/><text:tab/><text:tab/><text:tab/><text:tab/><text:tab/><text:tab/>25F-CY-102</text:p>
      <text:p text:style-name="P2"><text:tab/><text:tab/><text:tab/><text:tab/><text:tab/><text:span text:style-name="T1">LAB#2</text:span></text:p>
      <text:p text:style-name="P2"/>
      <text:p text:style-name="P2">Task 1:</text:p>
      <text:p text:style-name="P2"><draw:frame draw:style-name="fr1" draw:name="Image1" text:anchor-type="char" svg:x="-0.3339in" svg:y="0.2043in" svg:width="6.1563in" svg:height="6.4165in" draw:z-index="0"><draw:image xlink:href="Pictures/100000010000024F000002685197D5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Output:</text:p>
      <text:p text:style-name="P2"><draw:frame draw:style-name="fr1" draw:name="Image2" text:anchor-type="char" svg:x="-0.0528in" svg:y="0.2437in" svg:width="6.1563in" svg:height="6.4165in" draw:z-index="1"><draw:image xlink:href="Pictures/100000010000024F00000268A53E62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Task 2:</text:p>
      <text:p text:style-name="P3"><draw:frame draw:style-name="fr1" draw:name="Image3" text:anchor-type="char" svg:x="0.1555in" svg:y="0.2437in" svg:width="6.1563in" svg:height="5.7398in" draw:z-index="2"><draw:image xlink:href="Pictures/100000010000024F00000227EDDEF7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Output:</text:p>
      <text:p text:style-name="P3"/>
      <text:p text:style-name="P3"><draw:frame draw:style-name="fr2" draw:name="Image4" text:anchor-type="char" svg:width="6.1563in" svg:height="5.7398in" draw:z-index="3"><draw:image xlink:href="Pictures/100000010000024F0000022726B598A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ask 3:</text:p>
      <text:p text:style-name="P3"/>
      <text:p text:style-name="P3"><draw:frame draw:style-name="fr2" draw:name="Image5" text:anchor-type="char" svg:width="6.1563in" svg:height="5.7398in" draw:z-index="4"><draw:image xlink:href="Pictures/100000010000024F00000227DFC222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Output:</text:p>
      <text:p text:style-name="P3"><draw:frame draw:style-name="fr1" draw:name="Image6" text:anchor-type="char" svg:x="0.3016in" svg:y="0.1457in" svg:width="6.1563in" svg:height="5.7398in" draw:z-index="5"><draw:image xlink:href="Pictures/100000010000024F000002278D92DE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ask 4:</text:p>
      <text:p text:style-name="P3"><draw:frame draw:style-name="fr2" draw:name="Image7" text:anchor-type="char" svg:width="6.1563in" svg:height="5.7398in" draw:z-index="6"><draw:image xlink:href="Pictures/100000010000024F00000227AB9F8F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Output:</text:p>
      <text:p text:style-name="P3"><draw:frame draw:style-name="fr2" draw:name="Image8" text:anchor-type="char" svg:width="6.1563in" svg:height="5.7398in" draw:z-index="7"><draw:image xlink:href="Pictures/100000010000024F00000227E4E06F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Task 5:</text:p>
      <text:p text:style-name="P3"/>
      <text:p text:style-name="P3"><draw:frame draw:style-name="fr2" draw:name="Image9" text:anchor-type="char" svg:width="5.4374in" svg:height="6.198in" draw:z-index="8"><draw:image xlink:href="Pictures/100000010000020A0000025385A668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Output:</text:p>
      <text:p text:style-name="P3"><draw:frame draw:style-name="fr1" draw:name="Image10" text:anchor-type="char" svg:x="0.202in" svg:y="0.1728in" svg:width="5.4374in" svg:height="6.198in" draw:z-index="9"><draw:image xlink:href="Pictures/100000010000020A000002536651E9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Task 6 :</text:p>
      <text:p text:style-name="P4"><draw:frame draw:style-name="fr1" draw:name="Image11" text:anchor-type="char" svg:x="0.4366in" svg:y="0.2165in" svg:width="5.6354in" svg:height="6.4583in" draw:z-index="10"><draw:image xlink:href="Pictures/100000010000021D0000026C4F82DA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Output:</text:p>
      <text:p text:style-name="P1"/>
      <text:p text:style-name="P1"/>
      <text:p text:style-name="P1"><draw:frame draw:style-name="fr2" draw:name="Image12" text:anchor-type="char" svg:width="5.6354in" svg:height="6.4583in" draw:z-index="11"><draw:image xlink:href="Pictures/100000010000021D0000026C4DF423E8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08:48:09.103860367</meta:creation-date>
    <meta:editing-duration>PT4M14S</meta:editing-duration>
    <meta:editing-cycles>3</meta:editing-cycles>
    <meta:generator>LibreOffice/25.8.4.2$Linux_X86_64 LibreOffice_project/580$Build-2</meta:generator>
    <dc:date>2026-02-11T09:08:25.639146536</dc:date>
    <meta:print-date>2026-02-11T09:08:15.391420014</meta:print-date>
    <meta:printed-by>PDF files</meta:printed-by>
    <meta:document-statistic meta:table-count="0" meta:image-count="12" meta:object-count="0" meta:page-count="12" meta:paragraph-count="14" meta:word-count="23" meta:character-count="127" meta:non-whitespace-character-count="106"/>
  </office:meta>
</office:document-meta>
</file>