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F00000257C5CE8A9B.png" manifest:media-type="image/png"/>
  <manifest:file-entry manifest:full-path="Pictures/100000010000022F00000257DBA52616.png" manifest:media-type="image/png"/>
  <manifest:file-entry manifest:full-path="Pictures/100000010000022F0000025702181CD9.png" manifest:media-type="image/png"/>
  <manifest:file-entry manifest:full-path="Pictures/100000010000022F0000025738429C44.png" manifest:media-type="image/png"/>
  <manifest:file-entry manifest:full-path="Pictures/100000010000022F000002579C57FB69.png" manifest:media-type="image/png"/>
  <manifest:file-entry manifest:full-path="Pictures/100000010000022F000002578F1E18CD.png" manifest:media-type="image/png"/>
  <manifest:file-entry manifest:full-path="Pictures/100000010000022F000002577D117733.png" manifest:media-type="image/png"/>
  <manifest:file-entry manifest:full-path="Pictures/100000010000022F00000257748970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f4f" officeooo:paragraph-rsid="0017ef4f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7ef4f" officeooo:paragraph-rsid="0017ef4f" style:font-size-asian="16pt" style:font-weight-asian="bold" style:font-size-complex="16pt" style:font-weight-complex="bold"/>
    </style:style>
    <style:style style:name="T1" style:family="text">
      <style:text-properties officeooo:rsid="0018a628"/>
    </style:style>
    <style:style style:name="T2" style:family="text">
      <style:text-properties officeooo:rsid="001a3b69"/>
    </style:style>
    <style:style style:name="T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<text:span text:style-name="T2">mna Sarfaraz</text:span><text:tab/><text:tab/><text:tab/><text:tab/><text:tab/><text:tab/><text:tab/><text:tab/><text:tab/><text:tab/>25F-CY-<text:span text:style-name="T2">090</text:span></text:p>
      <text:p text:style-name="P1"/>
      <text:p text:style-name="P1"/>
      <text:p text:style-name="P1"><text:span text:style-name="T3"><text:tab/><text:tab/><text:tab/><text:tab/><text:tab/></text:span><text:span text:style-name="T4">OOP LAB #3</text:span></text:p>
      <text:p text:style-name="P2"/>
      <text:p text:style-name="P2">Task#1:</text:p>
      <text:p text:style-name="P2"><draw:frame draw:style-name="fr1" draw:name="Image1" text:anchor-type="char" svg:width="5.8228in" svg:height="6.2398in" draw:z-index="4"><draw:image xlink:href="Pictures/100000010000022F00000257748970A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><draw:frame draw:style-name="fr2" draw:name="Image2" text:anchor-type="char" svg:width="5.8228in" svg:height="6.2398in" draw:z-index="1"><draw:image xlink:href="Pictures/100000010000022F000002579C57FB6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sk # 2:</text:p>
      <text:p text:style-name="P2"><draw:frame draw:style-name="fr1" draw:name="Image3" text:anchor-type="char" svg:width="5.8228in" svg:height="6.2398in" draw:z-index="5"><draw:image xlink:href="Pictures/100000010000022F000002577D1177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/>
      <text:p text:style-name="P2"/>
      <text:p text:style-name="P2"/>
      <text:p text:style-name="P2"><draw:frame draw:style-name="fr3" draw:name="Image4" text:anchor-type="char" svg:x="-0.1882in" svg:y="0.1516in" svg:width="5.8228in" svg:height="6.2398in" draw:z-index="0"><draw:image xlink:href="Pictures/100000010000022F0000025738429C4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sk # 3</text:p>
      <text:p text:style-name="P2"><draw:frame draw:style-name="fr1" draw:name="Image5" text:anchor-type="char" svg:width="5.8228in" svg:height="6.2398in" draw:z-index="6"><draw:image xlink:href="Pictures/100000010000022F0000025702181CD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><draw:frame draw:style-name="fr2" draw:name="Image6" text:anchor-type="char" svg:width="5.8228in" svg:height="6.2398in" draw:z-index="2"><draw:image xlink:href="Pictures/100000010000022F000002578F1E18C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ask # 4:</text:p>
      <text:p text:style-name="P2"><draw:frame draw:style-name="fr1" draw:name="Image7" text:anchor-type="char" svg:width="5.8228in" svg:height="6.2398in" draw:z-index="7"><draw:image xlink:href="Pictures/100000010000022F00000257DBA5261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OutPut:</text:p>
      <text:p text:style-name="P2"/>
      <text:p text:style-name="P2"/>
      <text:p text:style-name="P2"/>
      <text:p text:style-name="P2"><draw:frame draw:style-name="fr2" draw:name="Image8" text:anchor-type="char" svg:width="5.8228in" svg:height="6.2398in" draw:z-index="3"><draw:image xlink:href="Pictures/100000010000022F00000257C5CE8A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erif1" style:font-size-complex="12pt" style:language-complex="ur" style:country-complex="PK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erif1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15:35:48.533865270</meta:creation-date>
    <meta:print-date>2026-02-22T16:32:12.124264338</meta:print-date>
    <meta:printed-by>PDF files</meta:printed-by>
    <dc:date>2026-02-22T16:32:15.436711109</dc:date>
    <meta:editing-duration>PT13S</meta:editing-duration>
    <meta:editing-cycles>2</meta:editing-cycles>
    <meta:generator>LibreOffice/25.8.4.2$Linux_X86_64 LibreOffice_project/580$Build-2</meta:generator>
    <meta:document-statistic meta:table-count="0" meta:image-count="8" meta:object-count="0" meta:page-count="8" meta:paragraph-count="10" meta:word-count="20" meta:character-count="109" meta:non-whitespace-character-count="85"/>
  </office:meta>
</office:document-meta>
</file>