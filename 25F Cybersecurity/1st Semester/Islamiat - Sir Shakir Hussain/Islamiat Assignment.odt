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erif" svg:font-family="FreeSerif" style:font-family-generic="roman"/>
    <style:font-face style:name="FreeSerif1" svg:font-family="FreeSerif"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Nastaliq Urdu" svg:font-family="'Noto Nastaliq Urdu'"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056in" table:align="left"/>
    </style:style>
    <style:style style:name="Table1.A" style:family="table-column">
      <style:table-column-properties style:column-width="0.5917in"/>
    </style:style>
    <style:style style:name="Table1.B" style:family="table-column">
      <style:table-column-properties style:column-width="5.6194in"/>
    </style:style>
    <style:style style:name="Table1.C" style:family="table-column">
      <style:table-column-properties style:column-width="0.6944in"/>
    </style:style>
    <style:style style:name="Table1.1" style:family="table-row">
      <style:table-row-properties style:min-row-height="0.7076in"/>
    </style:style>
    <style:style style:name="Table1.A1" style:family="table-cell">
      <style:table-cell-properties style:vertical-align="middle" fo:padding="0.0194in" fo:border="none"/>
    </style:style>
    <style:style style:name="Table1.7" style:family="table-row">
      <style:table-row-properties style:min-row-height="0.6285in"/>
    </style:style>
    <style:style style:name="Table1.8" style:family="table-row">
      <style:table-row-properties style:min-row-height="0.5917in"/>
    </style:style>
    <style:style style:name="P1" style:family="paragraph" style:parent-style-name="Text_20_body">
      <style:paragraph-properties fo:text-align="end" style:justify-single-word="false" style:writing-mode="rl-tb"/>
      <style:text-properties officeooo:paragraph-rsid="001907ec"/>
    </style:style>
    <style:style style:name="P2" style:family="paragraph" style:parent-style-name="Text_20_body">
      <style:paragraph-properties fo:text-align="end" style:justify-single-word="false" style:writing-mode="rl-tb"/>
      <style:text-properties officeooo:paragraph-rsid="001add3e"/>
    </style:style>
    <style:style style:name="P3" style:family="paragraph" style:parent-style-name="Text_20_body">
      <style:paragraph-properties fo:text-align="end" style:justify-single-word="false" style:writing-mode="rl-tb"/>
      <style:text-properties style:font-name="Noto Nastaliq Urdu" officeooo:rsid="001907ec" style:font-size-asian="12pt" style:font-name-complex="Noto Nastaliq Urdu"/>
    </style:style>
    <style:style style:name="P4" style:family="paragraph" style:parent-style-name="Text_20_body">
      <style:paragraph-properties fo:text-align="end" style:justify-single-word="false" style:writing-mode="rl-tb"/>
      <style:text-properties style:font-name="Noto Nastaliq Urdu" officeooo:rsid="001907ec" officeooo:paragraph-rsid="001cb44d" style:font-size-asian="12pt" style:font-name-complex="Noto Nastaliq Urdu"/>
    </style:style>
    <style:style style:name="P5" style:family="paragraph" style:parent-style-name="Text_20_body">
      <style:paragraph-properties fo:text-align="center" style:justify-single-word="false" style:writing-mode="rl-tb"/>
    </style:style>
    <style:style style:name="P6" style:family="paragraph" style:parent-style-name="Text_20_body">
      <style:paragraph-properties fo:text-align="center" style:justify-single-word="false" style:writing-mode="rl-tb"/>
      <style:text-properties style:font-name="Noto Nastaliq Urdu" officeooo:rsid="001907ec" officeooo:paragraph-rsid="002007e4" style:font-size-asian="12pt" style:font-name-complex="Noto Nastaliq Urdu"/>
    </style:style>
    <style:style style:name="P7" style:family="paragraph" style:parent-style-name="Table_20_Heading">
      <style:paragraph-properties fo:text-align="center" style:justify-single-word="false" style:writing-mode="rl-tb"/>
      <style:text-properties style:font-name="Noto Nastaliq Urdu" fo:font-size="16pt" officeooo:rsid="002007e4" officeooo:paragraph-rsid="002007e4" style:font-size-asian="16pt" style:font-name-complex="Noto Nastaliq Urdu" style:font-size-complex="16pt"/>
    </style:style>
    <style:style style:name="P8" style:family="paragraph" style:parent-style-name="Table_20_Heading">
      <style:paragraph-properties fo:text-align="center" style:justify-single-word="false" style:writing-mode="rl-tb"/>
      <style:text-properties style:font-name="Noto Nastaliq Urdu" fo:font-size="16pt" style:font-size-asian="16pt" style:font-name-complex="Noto Nastaliq Urdu" style:font-size-complex="16pt"/>
    </style:style>
    <style:style style:name="P9" style:family="paragraph" style:parent-style-name="Table_20_Contents">
      <style:paragraph-properties fo:text-align="center" style:justify-single-word="false" style:writing-mode="rl-tb"/>
      <style:text-properties officeooo:paragraph-rsid="002007e4"/>
    </style:style>
    <style:style style:name="P10" style:family="paragraph" style:parent-style-name="Table_20_Contents">
      <style:paragraph-properties fo:text-align="center" style:justify-single-word="false" style:writing-mode="rl-tb"/>
      <style:text-properties style:font-name="Noto Nastaliq Urdu" fo:font-size="16pt" style:font-size-asian="16pt" style:font-name-complex="Noto Nastaliq Urdu" style:font-size-complex="16pt"/>
    </style:style>
    <style:style style:name="P11" style:family="paragraph" style:parent-style-name="Table_20_Contents">
      <style:paragraph-properties fo:text-align="center" style:justify-single-word="false" style:writing-mode="rl-tb"/>
      <style:text-properties style:font-name="Noto Nastaliq Urdu" fo:font-size="16pt" officeooo:rsid="002007e4" officeooo:paragraph-rsid="002007e4" style:font-size-asian="16pt" style:font-name-complex="Noto Nastaliq Urdu" style:font-size-complex="16pt"/>
    </style:style>
    <style:style style:name="P12" style:family="paragraph" style:parent-style-name="Text_20_body">
      <style:paragraph-properties fo:text-align="center" style:justify-single-word="false" style:writing-mode="rl-tb"/>
      <style:text-properties style:font-name="Noto Nastaliq Urdu" fo:font-size="12pt" officeooo:rsid="001907ec" officeooo:paragraph-rsid="001907ec" style:font-size-asian="12pt" style:font-name-complex="Noto Nastaliq Urdu" style:font-size-complex="12pt"/>
    </style:style>
    <style:style style:name="P13" style:family="paragraph" style:parent-style-name="Text_20_body">
      <style:paragraph-properties fo:text-align="end" style:justify-single-word="false" style:writing-mode="rl-tb"/>
      <style:text-properties style:font-name="Noto Nastaliq Urdu" fo:font-size="12pt" officeooo:rsid="001907ec" officeooo:paragraph-rsid="001907ec" style:font-size-asian="12pt" style:font-name-complex="Noto Nastaliq Urdu" style:font-size-complex="12pt"/>
    </style:style>
    <style:style style:name="P14" style:family="paragraph" style:parent-style-name="Text_20_body">
      <style:paragraph-properties fo:text-align="end" style:justify-single-word="false" style:writing-mode="rl-tb"/>
      <style:text-properties style:font-name="Noto Nastaliq Urdu" fo:font-size="16pt" officeooo:rsid="001907ec" style:font-size-asian="16pt" style:font-name-complex="Noto Nastaliq Urdu" style:font-size-complex="16pt"/>
    </style:style>
    <style:style style:name="P15" style:family="paragraph" style:parent-style-name="Text_20_body">
      <style:paragraph-properties fo:text-align="end" style:justify-single-word="false" style:writing-mode="rl-tb"/>
      <style:text-properties style:font-name="Noto Nastaliq Urdu" fo:font-size="14pt" officeooo:rsid="001907ec" style:font-size-asian="14pt" style:font-name-complex="Noto Nastaliq Urdu" style:font-size-complex="14pt"/>
    </style:style>
    <style:style style:name="P16" style:family="paragraph" style:parent-style-name="Text_20_body">
      <style:paragraph-properties fo:text-align="end" style:justify-single-word="false" style:writing-mode="rl-tb"/>
      <style:text-properties style:font-name="Noto Nastaliq Urdu" fo:font-size="14pt" fo:font-weight="normal" officeooo:rsid="001907ec" style:font-size-asian="14pt" style:font-weight-asian="normal" style:font-name-complex="Noto Nastaliq Urdu" style:font-size-complex="14pt" style:font-weight-complex="normal"/>
    </style:style>
    <style:style style:name="P17" style:family="paragraph" style:parent-style-name="Text_20_body">
      <style:paragraph-properties fo:text-align="end" style:justify-single-word="false" style:writing-mode="rl-tb"/>
      <style:text-properties style:font-name="Noto Nastaliq Urdu" fo:font-size="16pt" fo:font-weight="bold" officeooo:rsid="001907ec" officeooo:paragraph-rsid="001907ec" style:font-size-asian="16pt" style:font-weight-asian="bold" style:font-name-complex="Noto Nastaliq Urdu" style:font-size-complex="16pt" style:font-weight-complex="bold"/>
    </style:style>
    <style:style style:name="P18" style:family="paragraph" style:parent-style-name="Text_20_body">
      <style:paragraph-properties fo:text-align="end" style:justify-single-word="false" style:writing-mode="rl-tb"/>
      <style:text-properties style:font-name="Noto Nastaliq Urdu" fo:font-size="12pt" fo:font-weight="normal" officeooo:rsid="001907ec" officeooo:paragraph-rsid="001907ec" style:font-size-asian="10.5pt" style:font-weight-asian="normal" style:font-name-complex="Noto Nastaliq Urdu" style:font-size-complex="12pt" style:font-weight-complex="normal"/>
    </style:style>
    <style:style style:name="P19" style:family="paragraph" style:parent-style-name="Text_20_body">
      <style:paragraph-properties fo:text-align="end" style:justify-single-word="false" style:writing-mode="rl-tb"/>
      <style:text-properties style:font-name="Noto Nastaliq Urdu" officeooo:rsid="001907ec" style:font-name-complex="Noto Nastaliq Urdu"/>
    </style:style>
    <style:style style:name="P20" style:family="paragraph" style:parent-style-name="Heading_20_3">
      <style:paragraph-properties fo:text-align="end" style:justify-single-word="false" style:writing-mode="rl-tb"/>
      <style:text-properties style:font-name="Noto Nastaliq Urdu" fo:font-size="14pt" fo:font-weight="normal" officeooo:rsid="001907ec" officeooo:paragraph-rsid="001907ec" style:font-size-asian="14pt" style:font-weight-asian="normal" style:font-name-complex="Noto Nastaliq Urdu" style:font-size-complex="14pt" style:font-weight-complex="normal"/>
    </style:style>
    <style:style style:name="P21" style:family="paragraph" style:parent-style-name="Heading_20_3">
      <style:paragraph-properties fo:margin-top="0in" fo:margin-bottom="0.0972in" style:contextual-spacing="false" fo:line-height="115%" fo:text-align="end" style:justify-single-word="false" style:writing-mode="rl-tb"/>
      <style:text-properties style:font-name="Noto Nastaliq Urdu" fo:font-weight="normal" officeooo:rsid="001907ec" style:font-weight-asian="normal" style:font-name-complex="Noto Nastaliq Urdu" style:font-weight-complex="normal"/>
    </style:style>
    <style:style style:name="P22" style:family="paragraph" style:parent-style-name="Text_20_body" style:list-style-name="L1">
      <style:paragraph-properties fo:text-align="end" style:justify-single-word="false" style:writing-mode="rl-tb"/>
      <style:text-properties style:font-name="Noto Nastaliq Urdu" fo:font-size="14pt" officeooo:rsid="001907ec" style:font-size-asian="14pt" style:font-name-complex="Noto Nastaliq Urdu" style:font-size-complex="14pt"/>
    </style:style>
    <style:style style:name="P23" style:family="paragraph" style:parent-style-name="Heading_20_3">
      <style:paragraph-properties fo:margin-top="0in" fo:margin-bottom="0.0972in" style:contextual-spacing="false" fo:line-height="115%" fo:text-align="end" style:justify-single-word="false" style:writing-mode="rl-tb"/>
      <style:text-properties style:font-name="Noto Nastaliq Urdu" officeooo:rsid="001907ec" style:font-name-complex="Noto Nastaliq Urdu"/>
    </style:style>
    <style:style style:name="P24" style:family="paragraph" style:parent-style-name="Text_20_body">
      <style:paragraph-properties fo:text-align="end" style:justify-single-word="false" style:writing-mode="rl-tb"/>
      <style:text-properties style:font-name="Noto Nastaliq Urdu" fo:font-size="14pt" officeooo:rsid="001907ec" officeooo:paragraph-rsid="001f19c3" style:font-size-asian="14pt" style:font-name-complex="Noto Nastaliq Urdu" style:font-size-complex="14pt"/>
    </style:style>
    <style:style style:name="P25" style:family="paragraph" style:parent-style-name="Text_20_body">
      <style:paragraph-properties fo:text-align="end" style:justify-single-word="false" style:writing-mode="rl-tb"/>
      <style:text-properties style:font-name="Noto Nastaliq Urdu" officeooo:rsid="001907ec" officeooo:paragraph-rsid="001f19c3" style:font-name-complex="Noto Nastaliq Urdu"/>
    </style:style>
    <style:style style:name="P26" style:family="paragraph" style:parent-style-name="Text_20_body" style:list-style-name="L2">
      <style:paragraph-properties fo:text-align="end" style:justify-single-word="false" style:writing-mode="rl-tb"/>
      <style:text-properties style:font-name="Noto Nastaliq Urdu" fo:font-size="14pt" officeooo:rsid="001907ec" style:font-size-asian="14pt" style:font-name-complex="Noto Nastaliq Urdu" style:font-size-complex="14pt"/>
    </style:style>
    <style:style style:name="P27" style:family="paragraph" style:parent-style-name="Text_20_body">
      <style:paragraph-properties fo:text-align="end" style:justify-single-word="false" style:writing-mode="rl-tb"/>
      <style:text-properties style:font-name="Noto Nastaliq Urdu" fo:font-size="14pt" fo:font-weight="normal" officeooo:rsid="001f19c3" officeooo:paragraph-rsid="001907ec" style:font-size-asian="14pt" style:font-weight-asian="normal" style:font-name-complex="Noto Nastaliq Urdu" style:font-size-complex="14pt" style:font-weight-complex="normal"/>
    </style:style>
    <style:style style:name="P28" style:family="paragraph" style:parent-style-name="Heading_20_1">
      <style:paragraph-properties fo:text-align="end" style:justify-single-word="false" style:writing-mode="rl-tb"/>
      <style:text-properties style:font-name="Noto Nastaliq Urdu" fo:font-size="14pt" fo:font-weight="normal" officeooo:rsid="001907ec" officeooo:paragraph-rsid="001907ec" style:font-size-asian="14pt" style:font-weight-asian="normal" style:font-name-complex="Noto Nastaliq Urdu" style:font-size-complex="14pt" style:font-weight-complex="normal"/>
    </style:style>
    <style:style style:name="P29" style:family="paragraph" style:parent-style-name="Heading_20_2">
      <style:paragraph-properties fo:margin-top="0in" fo:margin-bottom="0.0972in" style:contextual-spacing="false" fo:line-height="115%" fo:text-align="end" style:justify-single-word="false" style:writing-mode="rl-tb"/>
      <style:text-properties style:font-name="Noto Nastaliq Urdu" fo:font-size="14pt" fo:font-weight="normal" officeooo:rsid="001907ec" style:font-size-asian="14pt" style:font-weight-asian="normal" style:font-name-complex="Noto Nastaliq Urdu" style:font-size-complex="14pt" style:font-weight-complex="normal"/>
    </style:style>
    <style:style style:name="P30" style:family="paragraph" style:parent-style-name="Text_20_body" style:list-style-name="L3">
      <style:paragraph-properties fo:text-align="end" style:justify-single-word="false" style:writing-mode="rl-tb"/>
      <style:text-properties style:font-name="Noto Nastaliq Urdu" fo:font-size="14pt" officeooo:rsid="001907ec" style:font-size-asian="14pt" style:font-name-complex="Noto Nastaliq Urdu" style:font-size-complex="14pt"/>
    </style:style>
    <style:style style:name="P31" style:family="paragraph" style:parent-style-name="Text_20_body" style:list-style-name="L4">
      <style:paragraph-properties fo:text-align="end" style:justify-single-word="false" style:writing-mode="rl-tb"/>
      <style:text-properties style:font-name="Noto Nastaliq Urdu" fo:font-size="14pt" officeooo:rsid="001907ec" style:font-size-asian="14pt" style:font-name-complex="Noto Nastaliq Urdu" style:font-size-complex="14pt"/>
    </style:style>
    <style:style style:name="P32" style:family="paragraph" style:parent-style-name="Heading_20_1">
      <style:paragraph-properties fo:margin-top="0in" fo:margin-bottom="0.0972in" style:contextual-spacing="false" fo:line-height="115%" fo:text-align="end" style:justify-single-word="false" style:writing-mode="rl-tb"/>
      <style:text-properties style:font-name="Noto Nastaliq Urdu" fo:font-size="14pt" officeooo:rsid="001907ec" style:font-size-asian="14pt" style:font-name-complex="Noto Nastaliq Urdu" style:font-size-complex="14pt"/>
    </style:style>
    <style:style style:name="P33" style:family="paragraph" style:parent-style-name="Heading_20_2">
      <style:paragraph-properties fo:margin-top="0in" fo:margin-bottom="0.0972in" style:contextual-spacing="false" fo:line-height="115%" fo:text-align="end" style:justify-single-word="false" style:writing-mode="rl-tb"/>
      <style:text-properties style:font-name="Noto Nastaliq Urdu" fo:font-size="14pt" officeooo:rsid="001907ec" style:font-size-asian="14pt" style:font-name-complex="Noto Nastaliq Urdu" style:font-size-complex="14pt"/>
    </style:style>
    <style:style style:name="P34" style:family="paragraph" style:parent-style-name="Text_20_body" style:list-style-name="L5">
      <style:paragraph-properties fo:text-align="end" style:justify-single-word="false" style:writing-mode="rl-tb"/>
      <style:text-properties style:font-name="Noto Nastaliq Urdu" fo:font-size="14pt" officeooo:rsid="001907ec" style:font-size-asian="14pt" style:font-name-complex="Noto Nastaliq Urdu" style:font-size-complex="14pt"/>
    </style:style>
    <style:style style:name="P35" style:family="paragraph" style:parent-style-name="Text_20_body">
      <style:paragraph-properties fo:margin-top="0in" fo:margin-bottom="0.0972in" style:contextual-spacing="false" fo:line-height="115%" fo:text-align="end" style:justify-single-word="false" style:writing-mode="rl-tb"/>
      <style:text-properties style:font-name="Noto Nastaliq Urdu" fo:font-size="14pt" officeooo:rsid="001907ec" style:font-size-asian="14pt" style:font-name-complex="Noto Nastaliq Urdu" style:font-size-complex="14pt"/>
    </style:style>
    <style:style style:name="P36" style:family="paragraph" style:parent-style-name="Text_20_body">
      <style:paragraph-properties fo:text-align="end" style:justify-single-word="false" style:writing-mode="rl-tb"/>
      <style:text-properties style:font-name="Noto Nastaliq Urdu" fo:font-size="14pt" officeooo:rsid="001907ec" officeooo:paragraph-rsid="001ffa8a" style:font-size-asian="14pt" style:font-name-complex="Noto Nastaliq Urdu" style:font-size-complex="14pt"/>
    </style:style>
    <style:style style:name="P37" style:family="paragraph" style:parent-style-name="Text_20_body" style:list-style-name="L6">
      <style:paragraph-properties fo:text-align="end" style:justify-single-word="false" style:writing-mode="rl-tb"/>
      <style:text-properties style:font-name="Noto Nastaliq Urdu" fo:font-size="14pt" officeooo:rsid="001907ec" style:font-size-asian="14pt" style:font-name-complex="Noto Nastaliq Urdu" style:font-size-complex="14pt"/>
    </style:style>
    <style:style style:name="P38" style:family="paragraph" style:parent-style-name="Text_20_body" style:list-style-name="L7">
      <style:paragraph-properties fo:text-align="end" style:justify-single-word="false" style:writing-mode="rl-tb"/>
      <style:text-properties style:font-name="Noto Nastaliq Urdu" fo:font-size="14pt" officeooo:rsid="001907ec" style:font-size-asian="14pt" style:font-name-complex="Noto Nastaliq Urdu" style:font-size-complex="14pt"/>
    </style:style>
    <style:style style:name="P39" style:family="paragraph" style:parent-style-name="Text_20_body" style:list-style-name="L8">
      <style:paragraph-properties fo:text-align="end" style:justify-single-word="false" style:writing-mode="rl-tb"/>
      <style:text-properties style:font-name="Noto Nastaliq Urdu" fo:font-size="14pt" officeooo:rsid="001907ec" style:font-size-asian="14pt" style:font-name-complex="Noto Nastaliq Urdu" style:font-size-complex="14pt"/>
    </style:style>
    <style:style style:name="P40" style:family="paragraph" style:parent-style-name="Text_20_body" style:list-style-name="L9">
      <style:paragraph-properties fo:text-align="end" style:justify-single-word="false" style:writing-mode="rl-tb"/>
      <style:text-properties style:font-name="Noto Nastaliq Urdu" fo:font-size="14pt" officeooo:rsid="001907ec" style:font-size-asian="14pt" style:font-name-complex="Noto Nastaliq Urdu" style:font-size-complex="14pt"/>
    </style:style>
    <style:style style:name="P41" style:family="paragraph" style:parent-style-name="Text_20_body" style:list-style-name="L10">
      <style:paragraph-properties fo:text-align="end" style:justify-single-word="false" style:writing-mode="rl-tb"/>
      <style:text-properties style:font-name="Noto Nastaliq Urdu" fo:font-size="14pt" officeooo:rsid="001907ec" style:font-size-asian="14pt" style:font-name-complex="Noto Nastaliq Urdu" style:font-size-complex="14pt"/>
    </style:style>
    <style:style style:name="P42" style:family="paragraph" style:parent-style-name="Text_20_body" style:list-style-name="L11">
      <style:paragraph-properties fo:text-align="end" style:justify-single-word="false" style:writing-mode="rl-tb"/>
      <style:text-properties style:font-name="Noto Nastaliq Urdu" fo:font-size="14pt" officeooo:rsid="001907ec" style:font-size-asian="14pt" style:font-name-complex="Noto Nastaliq Urdu" style:font-size-complex="14pt"/>
    </style:style>
    <style:style style:name="T1" style:family="text">
      <style:text-properties style:font-name="Noto Nastaliq Urdu" fo:font-size="20pt" officeooo:rsid="001907ec" style:font-size-asian="20pt" style:font-name-complex="Noto Nastaliq Urdu" style:font-size-complex="20pt"/>
    </style:style>
    <style:style style:name="T2" style:family="text">
      <style:text-properties fo:font-size="20pt" style:font-size-asian="20pt" style:font-name-complex="Noto Nastaliq Urdu" style:font-size-complex="20pt"/>
    </style:style>
    <style:style style:name="T3" style:family="text">
      <style:text-properties style:font-name="Noto Nastaliq Urdu" fo:font-size="16pt" officeooo:rsid="001907ec" style:font-size-asian="16pt" style:font-name-complex="Noto Nastaliq Urdu" style:font-size-complex="16pt"/>
    </style:style>
    <style:style style:name="T4" style:family="text">
      <style:text-properties style:font-name="Noto Nastaliq Urdu" fo:font-size="16pt" officeooo:rsid="001cb44d" style:font-size-asian="16pt" style:font-name-complex="Noto Nastaliq Urdu" style:font-size-complex="16pt"/>
    </style:style>
    <style:style style:name="T5" style:family="text">
      <style:text-properties style:font-name="Noto Nastaliq Urdu" fo:font-size="16pt" fo:font-weight="normal" officeooo:rsid="001907ec" style:font-size-asian="16pt" style:font-weight-asian="normal" style:font-name-complex="Noto Nastaliq Urdu" style:font-size-complex="16pt" style:font-weight-complex="normal"/>
    </style:style>
    <style:style style:name="T6" style:family="text">
      <style:text-properties style:font-name="Noto Nastaliq Urdu" fo:font-size="16pt" fo:font-weight="normal" officeooo:rsid="001add3e" style:font-size-asian="16pt" style:font-weight-asian="normal" style:font-name-complex="Noto Nastaliq Urdu" style:font-size-complex="16pt" style:font-weight-complex="normal"/>
    </style:style>
    <style:style style:name="T7" style:family="text">
      <style:text-properties style:font-name="Noto Nastaliq Urdu" fo:font-size="16pt" fo:font-weight="normal" officeooo:rsid="001cb44d" style:font-size-asian="16pt" style:font-weight-asian="normal" style:font-name-complex="Noto Nastaliq Urdu" style:font-size-complex="16pt" style:font-weight-complex="normal"/>
    </style:style>
    <style:style style:name="T8" style:family="text">
      <style:text-properties fo:font-size="16pt" style:font-size-asian="16pt" style:font-size-complex="16pt"/>
    </style:style>
    <style:style style:name="T9" style:family="text">
      <style:text-properties fo:font-size="16pt" fo:font-weight="normal" style:font-size-asian="16pt" style:font-weight-asian="normal" style:font-size-complex="16pt" style:font-weight-complex="normal"/>
    </style:style>
    <style:style style:name="T10" style:family="text">
      <style:text-properties fo:font-size="16pt" fo:font-weight="normal" officeooo:rsid="001add3e" style:font-size-asian="16pt" style:font-weight-asian="normal" style:font-size-complex="16pt" style:font-weight-complex="normal"/>
    </style:style>
    <style:style style:name="T11" style:family="text">
      <style:text-properties fo:font-size="16pt" fo:font-weight="normal" officeooo:rsid="001cb44d" style:font-size-asian="16pt" style:font-weight-asian="normal" style:font-size-complex="16pt" style:font-weight-complex="normal"/>
    </style:style>
    <style:style style:name="T12" style:family="text">
      <style:text-properties style:font-name="Noto Nastaliq Urdu" fo:font-size="32pt" officeooo:rsid="001907ec" style:font-size-asian="32pt" style:font-name-complex="Noto Nastaliq Urdu" style:font-size-complex="32pt"/>
    </style:style>
    <style:style style:name="T13" style:family="text">
      <style:text-properties fo:font-size="32pt" style:font-size-asian="32pt" style:font-size-complex="32pt"/>
    </style:style>
    <style:style style:name="T14" style:family="text">
      <style:text-properties fo:font-size="16pt" officeooo:rsid="002007e4" style:font-size-asian="16pt" style:font-size-complex="16pt"/>
    </style:style>
    <style:style style:name="T15" style:family="text">
      <style:text-properties style:font-name="Noto Nastaliq Urdu" fo:font-size="16pt" officeooo:rsid="002007e4" style:font-size-asian="16pt" style:font-name-complex="Noto Nastaliq Urdu" style:font-size-complex="16pt"/>
    </style:style>
    <style:style style:name="T16" style:family="text">
      <style:text-properties officeooo:rsid="001e3d68"/>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weight="normal" style:font-weight-asian="normal" style:font-weight-complex="normal"/>
    </style:style>
    <style:style style:name="T20" style:family="text">
      <style:text-properties fo:font-size="14pt" style:font-size-asian="14pt" style:font-size-complex="14pt"/>
    </style:style>
    <style:style style:name="T21" style:family="text">
      <style:text-properties fo:font-size="18pt" style:font-size-asian="18pt" style:font-size-complex="18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tab/><text:tab/> <text:tab/><text:tab/></text:span></text:span><text:span text:style-name="Strong_20_Emphasis"><text:span text:style-name="T2">حضور ﷺ کی معاشرتی سرگرمیاں</text:span></text:span></text:p>
      <text:p text:style-name="P1"><text:span text:style-name="Strong_20_Emphasis"><text:span text:style-name="T2"/></text:span></text:p>
      <text:p text:style-name="P2"><text:span text:style-name="Strong_20_Emphasis"><text:span text:style-name="T3">نام </text:span></text:span><text:span text:style-name="Strong_20_Emphasis"><text:span text:style-name="T4">(رول نمبر)</text:span></text:span><text:span text:style-name="Strong_20_Emphasis"><text:span text:style-name="T3">:<text:tab/></text:span></text:span><text:span text:style-name="Strong_20_Emphasis"><text:span text:style-name="T5"> </text:span></text:span><text:span text:style-name="Strong_20_Emphasis"><text:span text:style-name="T6">محمد ریحان</text:span></text:span><text:span text:style-name="Strong_20_Emphasis"><text:span text:style-name="T7">(102)</text:span></text:span><text:span text:style-name="Strong_20_Emphasis"><text:span text:style-name="T6"> ، طٰہٰ خان</text:span></text:span><text:span text:style-name="Strong_20_Emphasis"><text:span text:style-name="T7">(88)</text:span></text:span><text:span text:style-name="Strong_20_Emphasis"><text:span text:style-name="T6">، نور فاطم</text:span></text:span><text:span text:style-name="Strong_20_Emphasis"><text:span text:style-name="T7">ہ(108)</text:span></text:span><text:span text:style-name="Strong_20_Emphasis"><text:span text:style-name="T6">، آیان علی</text:span></text:span><text:span text:style-name="Strong_20_Emphasis"><text:span text:style-name="T7">(83)</text:span></text:span><text:span text:style-name="Strong_20_Emphasis"><text:span text:style-name="T6"> ،عائزہ <text:tab/><text:tab/><text:tab/>نظام</text:span></text:span><text:span text:style-name="Strong_20_Emphasis"><text:span text:style-name="T7">(103)،</text:span></text:span><text:span text:style-name="Strong_20_Emphasis"><text:span text:style-name="T6"> سید واصف</text:span></text:span><text:span text:style-name="Strong_20_Emphasis"><text:span text:style-name="T7">(60)</text:span></text:span></text:p>
      <text:p text:style-name="P3"><text:span text:style-name="Strong_20_Emphasis"><text:span text:style-name="T8">جماعت:<text:tab/><text:tab/></text:span></text:span><text:span text:style-name="Strong_20_Emphasis"><text:span text:style-name="T9"> بی ایس </text:span></text:span></text:p>
      <text:p text:style-name="P3"><text:span text:style-name="Strong_20_Emphasis"><text:span text:style-name="T8">مضمون:<text:tab/><text:tab/> </text:span></text:span><text:span text:style-name="Strong_20_Emphasis"><text:span text:style-name="T9">اسلامیات (لازمی)</text:span></text:span></text:p>
      <text:p text:style-name="P3"><text:span text:style-name="Strong_20_Emphasis"><text:span text:style-name="T8">کورس نمبر:<text:tab/><text:tab/> </text:span></text:span><text:span text:style-name="Strong_20_Emphasis"><text:span text:style-name="T10">1001 -HS</text:span></text:span></text:p>
      <text:p text:style-name="P3"><text:span text:style-name="Strong_20_Emphasis"><text:span text:style-name="T8">سال:<text:tab/><text:tab/><text:tab/> </text:span></text:span><text:span text:style-name="Strong_20_Emphasis"><text:span text:style-name="T11">اول</text:span></text:span></text:p>
      <text:p text:style-name="P4"><text:span text:style-name="Strong_20_Emphasis"><text:span text:style-name="T8">استاد:<text:tab/><text:tab/> <text:tab/></text:span></text:span><text:span text:style-name="Strong_20_Emphasis"><text:span text:style-name="T9"> ڈاکٹر شاکر حسین خان</text:span></text:span></text:p>
      <text:p text:style-name="P3"><text:span text:style-name="Strong_20_Emphasis"><text:span text:style-name="T8">کورس انچارج: <text:tab/></text:span></text:span><text:span text:style-name="Strong_20_Emphasis"><text:span text:style-name="T9">ڈاکٹر شاکر حسین خان</text:span></text:span></text:p>
      <text:p text:style-name="P3"><text:span text:style-name="Strong_20_Emphasis"><text:span text:style-name="T8">شعبہ:<text:tab/><text:tab/> <text:tab/></text:span></text:span><text:span text:style-name="Strong_20_Emphasis"><text:span text:style-name="T10">سائبر سکیورٹی</text:span></text:span></text:p>
      <text:p text:style-name="P5"><text:span text:style-name="Strong_20_Emphasis"><text:span text:style-name="T12">جامعہ داؤد <text:s/></text:span></text:span><text:span text:style-name="Strong_20_Emphasis"><text:span text:style-name="T13">۲۰۲۵</text:span></text:span></text:p>
      <text:p text:style-name="P6"><text:soft-page-break/><text:span text:style-name="Strong_20_Emphasis"><text:span text:style-name="T14">فہرست</text:span></text:span></text:p>
      <text:p text:style-name="P6"><text:span text:style-name="Strong_20_Emphasis"><text:span text:style-name="T14"/></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صفحہ</text:p>
            </table:table-cell>
            <table:table-cell table:style-name="Table1.A1" office:value-type="string">
              <text:p text:style-name="P8">عنوانات</text:p>
            </table:table-cell>
            <table:table-cell table:style-name="Table1.A1" office:value-type="string">
              <text:p text:style-name="P7">شمار</text:p>
            </table:table-cell>
          </table:table-row>
        </table:table-header-rows>
        <table:table-row>
          <table:table-cell table:style-name="Table1.A1" office:value-type="string">
            <text:p text:style-name="P9"><text:span text:style-name="Strong_20_Emphasis"><text:span text:style-name="T15">3</text:span></text:span></text:p>
          </table:table-cell>
          <table:table-cell table:style-name="Table1.A1" office:value-type="string">
            <text:p text:style-name="P10">حضور ﷺ کی معاشرتی سرگرمیوں کا تعارف</text:p>
          </table:table-cell>
          <table:table-cell table:style-name="Table1.A1" office:value-type="string">
            <text:p text:style-name="P11">1</text:p>
          </table:table-cell>
        </table:table-row>
        <table:table-row>
          <table:table-cell table:style-name="Table1.A1" office:value-type="string">
            <text:p text:style-name="P9"><text:span text:style-name="Strong_20_Emphasis"><text:span text:style-name="T15">4</text:span></text:span></text:p>
          </table:table-cell>
          <table:table-cell table:style-name="Table1.A1" office:value-type="string">
            <text:p text:style-name="P10">معرکۂ فِجَار میں شرکت</text:p>
          </table:table-cell>
          <table:table-cell table:style-name="Table1.A1" office:value-type="string">
            <text:p text:style-name="P11">2</text:p>
          </table:table-cell>
        </table:table-row>
        <table:table-row>
          <table:table-cell table:style-name="Table1.A1" office:value-type="string">
            <text:p text:style-name="P9"><text:span text:style-name="Strong_20_Emphasis"><text:span text:style-name="T15">8</text:span></text:span></text:p>
          </table:table-cell>
          <table:table-cell table:style-name="Table1.A1" office:value-type="string">
            <text:p text:style-name="P10">حلفُ الفُضول میں شمولیت</text:p>
          </table:table-cell>
          <table:table-cell table:style-name="Table1.A1" office:value-type="string">
            <text:p text:style-name="P11">3</text:p>
          </table:table-cell>
        </table:table-row>
        <table:table-row>
          <table:table-cell table:style-name="Table1.A1" office:value-type="string">
            <text:p text:style-name="P9"><text:span text:style-name="Strong_20_Emphasis"><text:span text:style-name="T15">12</text:span></text:span></text:p>
          </table:table-cell>
          <table:table-cell table:style-name="Table1.A1" office:value-type="string">
            <text:p text:style-name="P10">کسبِ معاش </text:p>
          </table:table-cell>
          <table:table-cell table:style-name="Table1.A1" office:value-type="string">
            <text:p text:style-name="P11">4</text:p>
          </table:table-cell>
        </table:table-row>
        <table:table-row>
          <table:table-cell table:style-name="Table1.A1" office:value-type="string">
            <text:p text:style-name="P9"><text:span text:style-name="Strong_20_Emphasis"><text:span text:style-name="T15">15</text:span></text:span></text:p>
          </table:table-cell>
          <table:table-cell table:style-name="Table1.A1" office:value-type="string">
            <text:p text:style-name="P10">سفر و تجارت</text:p>
          </table:table-cell>
          <table:table-cell table:style-name="Table1.A1" office:value-type="string">
            <text:p text:style-name="P11">5</text:p>
          </table:table-cell>
        </table:table-row>
        <table:table-row table:style-name="Table1.7">
          <table:table-cell table:style-name="Table1.A1" office:value-type="string">
            <text:p text:style-name="P9"><text:span text:style-name="Strong_20_Emphasis"><text:span text:style-name="T15">17</text:span></text:span></text:p>
          </table:table-cell>
          <table:table-cell table:style-name="Table1.A1" office:value-type="string">
            <text:p text:style-name="P10"><text:span text:style-name="T16">­</text:span>سیدہ خدیجہ رضی اللہ عنہا سے نکاح</text:p>
          </table:table-cell>
          <table:table-cell table:style-name="Table1.A1" office:value-type="string">
            <text:p text:style-name="P11">6</text:p>
          </table:table-cell>
        </table:table-row>
        <table:table-row table:style-name="Table1.8">
          <table:table-cell table:style-name="Table1.A1" office:value-type="string">
            <text:p text:style-name="P9"><text:span text:style-name="Strong_20_Emphasis"><text:span text:style-name="T15">20</text:span></text:span></text:p>
          </table:table-cell>
          <table:table-cell table:style-name="Table1.A1" office:value-type="string">
            <text:p text:style-name="P11">حوالہ جات</text:p>
          </table:table-cell>
          <table:table-cell table:style-name="Table1.A1" office:value-type="string">
            <text:p text:style-name="P11">7</text:p>
          </table:table-cell>
        </table:table-row>
      </table:table>
      <text:p text:style-name="P12"><text:span text:style-name="Strong_20_Emphasis"><text:span text:style-name="T3"/></text:span></text:p>
      <text:p text:style-name="P12"><text:span text:style-name="Strong_20_Emphasis"><text:span text:style-name="T3"/></text:span></text:p>
      <text:p text:style-name="P13"><text:span text:style-name="Strong_20_Emphasis"><text:span text:style-name="T3"/></text:span></text:p>
      <text:p text:style-name="P13"><text:soft-page-break/><text:span text:style-name="Strong_20_Emphasis"><text:span text:style-name="T3"/></text:span></text:p>
      <text:p text:style-name="P13"><text:span text:style-name="Strong_20_Emphasis"><text:span text:style-name="T3"/></text:span></text:p>
      <text:p text:style-name="P13"><text:span text:style-name="Strong_20_Emphasis"><text:span text:style-name="T3"/></text:span></text:p>
      <text:p text:style-name="P13"><text:span text:style-name="Strong_20_Emphasis"><text:span text:style-name="T8">حضور ﷺ کی معاشرتی سرگرمیوں کا تعارف:</text:span></text:span></text:p>
      <text:p text:style-name="P13"><text:span text:style-name="Strong_20_Emphasis"><text:span text:style-name="T17">نبی کریم ﷺ کی پوری حیاتِ طیبہ انسانی معاشرے کی تعمیر و تشکیل کا کامل نمونہ ہے۔ آپ ﷺ نے عرب کے ٹوٹے پھوٹے، جنگوں میں بٹے ہوئے اور اخلاقی طور پر زوال پذیر معاشرے کو امن، عدل، شفقت، مساوات اور ذمہ داری کے اصولوں پر کھڑا کیا۔ معاشرتی زندگی میں حضور ﷺ کا کردار صرف ایک مذہبی رہبر کا نہیں تھا بلکہ ایک معاشرتی مصلح، تاجر، ہمسایہ، دوست، قبیلے کے فرد، خاندان کے سرپرست، معاہدات کے گواہ، صلح کے داعی اور مظلوموں کے تحفظ کرنے والے رہنما کا تھا۔</text:span></text:span></text:p>
      <text:p text:style-name="P14"><text:span text:style-name="T17">اسلامی تعلیمات کی بنیاد ہی معاشرتی اصلاح پر ہے، جیسا کہ قرآن مجید میں ارشاد ہے:<text:line-break/></text:span><text:span text:style-name="Strong_20_Emphasis"><text:span text:style-name="T18">”وَمَا أَرْسَلْنَاكَ إِلَّا رَحْمَةً لِلْعَالَمِينَ“</text:span></text:span><text:span text:style-name="T17"><text:line-break/>(الأنبیاء: 107)<text:line-break/>یعنی:</text:span><text:span text:style-name="T18"> </text:span><text:span text:style-name="Emphasis"><text:span text:style-name="T18">اے نبی ﷺ! ہم نے آپ کو ساری دنیا کے لیے رحمت بنا کر بھیجا ہے۔</text:span></text:span></text:p>
      <text:p text:style-name="P15"><text:soft-page-break/><text:span text:style-name="T19">یہ رحمت سب سے واضح طور پر آپ ﷺ کی معاشرتی سرگرمیوں میں نظر آتی ہے۔ نبی ﷺ نے ہر طبقے کے انسان کو عزت دی — امیر ہو یا فقیر، آزاد ہو یا غلام، عورت ہو یا مرد، بزرگ ہو یا نوجوان — ہر ایک کے لیے ہمدردی، انصاف اور آسانی کے اصول قائم کیے۔</text:span></text:p>
      <text:p text:style-name="P14"><text:span text:style-name="T17">حضرت انسؓ فرماتے ہیں<text:line-break/></text:span><text:span text:style-name="Strong_20_Emphasis"><text:span text:style-name="T17">“نبی ﷺ لوگوں میں سب سے زیادہ خوش اخلاق تھے۔”</text:span></text:span><text:span text:style-name="T17"><text:line-break/>(صحیح بخاری، کتاب الأَدَب)</text:span></text:p>
      <text:p text:style-name="P16">یہ حدیث واضح کرتی ہے کہ آپ ﷺ کا بنیادی معاشرتی پہلو حسنِ اخلاق تھا، جو ہر معاشرتی عمل کی بنیاد ہے۔</text:p>
      <text:p text:style-name="P17"/>
      <text:p text:style-name="P17">معرکۂ فِجَار میں شرکت</text:p>
      <text:p text:style-name="P18"><text:span text:style-name="T20">معرکۂ فِجَار عرب کے مشہور معرکوں میں سے ہے، جو ایامِ جاہلیت میں پیش آیا۔ اس جنگ کو </text:span><text:span text:style-name="Strong_20_Emphasis"><text:span text:style-name="T17">"فِجار"</text:span></text:span><text:span text:style-name="T20"> اس لیے کہا گیا کہ یہ مقدس مہینوں کی حرمت توڑ کر لڑی گئی تھی۔ عرب قبائل ان مہینوں میں لڑائی جھگڑے سے باز رہتے تھے، مگر اس جنگ میں ان حرمت والے مہینوں کا احترام پامال کیا گیا۔</text:span></text:p>
      <text:p text:style-name="P19"><text:soft-page-break/><text:span text:style-name="T17">حضورِ اکرم ﷺ اس وقت نوجوان تھے اور قریش کے ساتھ اس جنگ میں شریک ہوئے۔ آپ ﷺ کی شرکت اس وقت عرب معاشرتی نظام کا حصہ تھی، کیونکہ ہر نوجوان اپنے قبیلے کے ساتھ کھڑا ہوتا تھا۔ لیکن اس مقام پر سب سے اہم بات یہ ہے کہ آپ ﷺ نے جنگ میں </text:span><text:span text:style-name="Strong_20_Emphasis"><text:span text:style-name="T17">اصل لڑائی نہیں کی</text:span></text:span><text:span text:style-name="T17">، بلکہ اپنی کم عمری کے باعث </text:span><text:span text:style-name="Strong_20_Emphasis"><text:span text:style-name="T17">تیر اٹھانا</text:span></text:span><text:span text:style-name="T17"> اور قریش کے لیے خیموں میں </text:span><text:span text:style-name="Strong_20_Emphasis"><text:span text:style-name="T17">رسد پہنچانا، تیر جمع کرنا</text:span></text:span><text:span text:style-name="T17"> اور حفاظتی معاونت جیسے کام کیے۔</text:span></text:p>
      <text:p text:style-name="P19"><text:span text:style-name="T17">یہ واقعہ اس بات کی دلیل ہے کہ حضور ﷺ کا کردار ابتدا ہی سے </text:span><text:span text:style-name="Strong_20_Emphasis"><text:span text:style-name="T17">ذمہ داری، شرافت، ضبط اور اعتدال</text:span></text:span><text:span text:style-name="T17"> پر مبنی تھا۔<text:line-break/>ابنِ ہشام کی سیرت میں مذکور ہے کہ حضور ﷺ نے فرمایا:<text:line-break/></text:span><text:span text:style-name="Strong_20_Emphasis"><text:span text:style-name="T17">“میں اپنے چچاؤں کے ساتھ فجار میں شریک ہوا اور میں تیر اٹھا اٹھا کر ان کو دیتا تھا۔”</text:span></text:span><text:span text:style-name="T17"><text:line-break/>(سیرۃ ابن ہشام)</text:span></text:p>
      <text:p text:style-name="P16">اسی شرکت نے آپ ﷺ کے مزاج میں وہ اخلاقی جرأت پیدا کی جو بعد میں بڑے بڑے سماجی، سیاسی اور انسانی فیصلوں کی بنیاد بنی۔</text:p>
      <text:h text:style-name="P20" text:outline-level="3"><text:span text:style-name="Strong_20_Emphasis"><text:span text:style-name="T21">فِجار کی وجہِ تسمیہ اور پس منظر</text:span></text:span></text:h>
      <text:p text:style-name="P15">عرب معاشرے میں چار حرمت والے مہینے تھے:<text:line-break/><text:span text:style-name="Strong_20_Emphasis">ذوالقعدہ، ذوالحج، محرم، رجب</text:span>۔<text:line-break/><text:soft-page-break/>ان میں لڑائی کو سخت برا سمجھا جاتا تھا، مگر دو قبائل میں اختلاف بڑھا اور <text:span text:style-name="Strong_20_Emphasis">قبیلہ کنانہ</text:span> اور <text:span text:style-name="Strong_20_Emphasis">قبیلہ ہوازن</text:span> کے درمیان لڑائی چھڑ گئی۔</text:p>
      <text:p text:style-name="P15">قریش چونکہ کنانہ کے حلیف تھے، اس لیے جنگ میں شامل ہوئے۔ رسولِ اکرم ﷺ قریش کے ساتھ شریک ہوئے مگر آپ ﷺ کا کردار خالصتاً <text:span text:style-name="Strong_20_Emphasis">مددگارانہ</text:span> اور <text:span text:style-name="Strong_20_Emphasis">غیر جارحانہ</text:span> تھا۔</text:p>
      <text:p text:style-name="P15">یہی وہ مقام ہے جہاں مؤرخین نے لکھا کہ رسول اللہ ﷺ نے ابتدائی زمانے میں بھی <text:span text:style-name="Strong_20_Emphasis">ظلم کا ساتھ نہیں دیا</text:span> بلکہ جس حد تک ممکن ہوا اخلاقی حدود میں رہ کر اپنے قبیلے کی ذمہ داری ادا کی۔</text:p>
      <text:h text:style-name="P21" text:outline-level="3"><text:span text:style-name="Strong_20_Emphasis">معاشرتی تناظر</text:span></text:h>
      <text:p text:style-name="P15">معرکۂ فجار میں شرکت سے رسولِ اکرم ﷺ کی معاشرتی سمجھ بوجھ کے چند پہلو واضح ہوتے ہیں:</text:p>
      <text:list text:style-name="L1">
        <text:list-item>
          <text:p text:style-name="P22"><text:span text:style-name="Strong_20_Emphasis">آپ ﷺ نے قبائلی نظام کے تحت ذمہ داری نبھائی، مگر جارحیت اختیار نہ کی۔</text:span></text:p>
        </text:list-item>
        <text:list-item>
          <text:p text:style-name="P22"><text:span text:style-name="Strong_20_Emphasis">آپ ﷺ نے جنگ میں قتل و غارت کے بجائے معاونت والا کردار چنا۔</text:span></text:p>
        </text:list-item>
        <text:list-item>
          <text:p text:style-name="P22"><text:span text:style-name="Strong_20_Emphasis">آپ ﷺ نے حرمت والے مہینوں کی بے حرمتی پر افسوس کا اظہار کیا۔</text:span></text:p>
        </text:list-item>
        <text:list-item>
          <text:p text:style-name="P22"><text:span text:style-name="Strong_20_Emphasis">آپ ﷺ کا کردار ایک امن پسند نوجوان کا تھا جو اپنے قبیلے کے ساتھ کھڑا ہے مگر ظلم کو پسند نہیں کرتا۔</text:span></text:p>
        </text:list-item>
      </text:list>
      <text:p text:style-name="P15"><text:soft-page-break/>یہی وجہ ہے کہ بعد میں جب "حلفُ الفُضول" قائم ہوا تو آپ ﷺ اس میں سب سے بڑھ کر شریک ہوئے، کیونکہ وہ <text:span text:style-name="Emphasis">ظالم کے خلاف</text:span> معاہدہ تھا۔</text:p>
      <text:h text:style-name="P20" text:outline-level="3"><text:span text:style-name="Strong_20_Emphasis">حضور ﷺ کے اخلاقی پہلو اس واقعے سے ظاہر ہوتے ہیں</text:span></text:h>
      <text:p text:style-name="P15">معرکۂ فجار میں آپ ﷺ کی شرکت ہمیں کئی عظیم اخلاقی اور سماجی نکات سمجھاتی ہے:</text:p>
      <text:h text:style-name="P23" text:outline-level="3"><text:span text:style-name="Strong_20_Emphasis">۱۔ امن پسندی اور اعتدال</text:span></text:h>
      <text:p text:style-name="P15">جاہلانہ معاشرے میں پلے ہونے کے باوجود آپ ﷺ نے کبھی جارحانہ یا ظالمانہ کردار اختیار نہ کیا۔<text:line-break/>ابن ہشام میں روایت ہے کہ:<text:line-break/><text:span text:style-name="Strong_20_Emphasis">“رسول اللہ ﷺ نے فرمایا کہ میں نے فجار میں تیر اٹھا کر دیے، مگر کسی پر حملہ نہیں کیا۔”</text:span></text:p>
      <text:p text:style-name="P24">یہ امن پسندی آپ ﷺ کی فطرت تھی، جس نے بعد میں پورے معاشرتی نظام کو امن پر قائم کیا۔</text:p>
      <text:p text:style-name="P25"><text:span text:style-name="Strong_20_Emphasis">۲۔ ظلم کی حمایت نہ کرنا</text:span></text:p>
      <text:p text:style-name="P15">آپ ﷺ نے قریش کے ساتھ ہونے کے باوجود کبھی ظلم یا زیادتی پسند نہ فرمائی۔<text:line-break/>معرکۂ فجار کے فوراً بعد آپ ﷺ <text:span text:style-name="Strong_20_Emphasis">حلفُ الفُضول</text:span> میں شریک ہوئے، جس کا مقصد تھا:<text:line-break/><text:span text:style-name="Strong_20_Emphasis">"مظلوم کی مدد کرنا، خواہ وہ کسی بھی قبیلے کا ہو"</text:span></text:p>
      <text:p text:style-name="P15">یہ اس بات کا ثبوت ہے کہ معرکۂ فجار میں شرکت محض قبائلی ذمہ داری تھی، ظلم کی حمایت نہیں۔</text:p>
      <text:h text:style-name="P23" text:outline-level="3"><text:soft-page-break/><text:span text:style-name="Strong_20_Emphasis">۳۔ نوجوانوں کے لیے عملی سبق</text:span></text:h>
      <text:p text:style-name="P15">حضور ﷺ کے اس کردار سے نوجوانوں کو یہ تین بڑے سبق ملتے ہیں:</text:p>
      <text:list text:style-name="L2">
        <text:list-item>
          <text:p text:style-name="P26">ذمہ داری نبھاؤ مگر ظلم کا ساتھ نہ دو</text:p>
        </text:list-item>
        <text:list-item>
          <text:p text:style-name="P26">امن کو ترجیح دو</text:p>
        </text:list-item>
        <text:list-item>
          <text:p text:style-name="P26">اخلاق کو جنگ سے مقدم رکھو</text:p>
        </text:list-item>
      </text:list>
      <text:h text:style-name="P20" text:outline-level="3"><text:span text:style-name="Strong_20_Emphasis">نتیجہ</text:span></text:h>
      <text:p text:style-name="P15">معرکۂ فِجار میں شرکت حضورِ اکرم ﷺ کی ابتدائی معاشرتی سرگرمیوں کا اہم حصہ ہے، لیکن اس میں بھی آپ ﷺ نے <text:span text:style-name="Strong_20_Emphasis">قتل و غارت</text:span> کے بجائے <text:span text:style-name="Strong_20_Emphasis">خدمت، معاونت، اخلاق، ضبط اور امن</text:span> کو ترجیح دی۔<text:line-break/>یہی صفات آگے چل کر آپ ﷺ کی پوری معاشرتی اور سیاسی زندگی کی بنیاد بنیں، اور آپ ﷺ انسانیت کے لیے رحمت بن کر ابھرے۔</text:p>
      <text:p text:style-name="P27"/>
      <text:h text:style-name="P28" text:outline-level="1"><text:span text:style-name="Strong_20_Emphasis">حلفُ الفضول میں شمولیت</text:span></text:h>
      <text:p text:style-name="P15">حضور نبی اکرم ﷺ کی بعثت سے پہلے عرب معاشرہ ظلم، ناانصافی، طبقاتی تفریق اور طاقت کے غلط استعمال میں مبتلا تھا۔ کمزور، یتیم اور مسافر کا کوئی مددگار نہ تھا۔ قریش کے بڑے سردار صرف اپنی برادری <text:soft-page-break/>کے لوگوں کا ساتھ دیتے تھے، جبکہ باہر سے آنے والے تاجروں، حاجیوں یا مظلوم مسافروں کے لیے انصاف کا دروازہ اکثر بند ہوتا تھا۔ ایسے ماحول میں حضور ﷺ جوانی ہی سے عدل، دیانت اور حق پسندی کے نمائندہ تھے۔ آپ ﷺ نے ہمیشہ ظلم کے خلاف آواز بلند کی، اور اسی مقصد کے تحت آپ ﷺ نے <text:span text:style-name="Strong_20_Emphasis">حلفُ الفضول</text:span> جیسے عظیم معاہدے میں شرکت فرمائی۔</text:p>
      <text:h text:style-name="P29" text:outline-level="2"><text:span text:style-name="Strong_20_Emphasis">حلفُ الفضول کیا تھا؟</text:span></text:h>
      <text:p text:style-name="P15">حلفُ الفضول دراصل قریش کے چند معزز خاندانوں کا وہ تاریخی معاہدہ تھا جس کا مقصد یہ تھا کہ:</text:p>
      <text:list text:style-name="L3">
        <text:list-item>
          <text:p text:style-name="P30">مکہ میں کسی بھی مظلوم پر ظلم نہ ہونے دیا جائے</text:p>
        </text:list-item>
        <text:list-item>
          <text:p text:style-name="P30">ظلم کرنے والے کو طاقت ور ہونے کے باوجود روکا جائے</text:p>
        </text:list-item>
        <text:list-item>
          <text:p text:style-name="P30">مسافر، پردیسی اور کمزور انسان کی مدد کی جائے</text:p>
        </text:list-item>
        <text:list-item>
          <text:p text:style-name="P30">انصاف کو نسب، قبیلے، طاقت اور دولت سے بالاتر رکھا جائے</text:p>
        </text:list-item>
      </text:list>
      <text:p text:style-name="P15">یہ عرب میں عدالت اور انسانی حقوق کی پہلی باقاعدہ اجتماعی تحریک تھی۔ اسی لیے مؤرخین نے اسے <text:span text:style-name="Strong_20_Emphasis">عرب کا پہلا انسانی حقوق کا چارٹر</text:span> بھی کہا ہے۔</text:p>
      <text:h text:style-name="P29" text:outline-level="2"><text:soft-page-break/><text:span text:style-name="Strong_20_Emphasis">حلفِ الفضول کے قیام کا سبب</text:span></text:h>
      <text:p text:style-name="P15">ابن اسحاق اور دیگر مؤرخین لکھتے ہیں کہ یمن کے ایک تاجر نے مکہ میں سامان بیچا، مگر مکہ کے ایک طاقت ور سردار نے اس کا مال تو لے لیا مگر قیمت ادا نہ کی۔ مظلوم تاجر نے قریش کی مجلسوں میں فریاد کی مگر کوئی سننے کو تیار نہ تھا۔ آخرکار اس نے مکہ کی گلیوں میں آواز لگائی:</text:p>
      <text:p text:style-name="P15">"<text:span text:style-name="Emphasis">اے اہلِ مکہ! کیا تم میں کوئی ہے جو میرے ظلم کا بدلہ دلائے؟</text:span>"</text:p>
      <text:p text:style-name="P15">اس کی یہ دردناک صدا کچھ قریشی قبائل کے غیور لوگوں کے دل پر اثر کر گئی۔ چنانچہ خاندانِ ہاشم، زہرہ، بنی تمیم اور بنی مخزوم کے چند معززین جمع ہوئے اور <text:span text:style-name="Strong_20_Emphasis">عبداللہ بن جدعان</text:span> کے گھر میں ایک تاریخی معاہدہ طے کیا گیا۔</text:p>
      <text:p text:style-name="P15">اسی محفل میں حضورِ اقدس ﷺ بھی موجود تھے، حالانکہ آپ ﷺ کی عمر اُس وقت تقریباً بیس برس کے قریب تھی۔</text:p>
      <text:h text:style-name="P29" text:outline-level="2"><text:span text:style-name="Strong_20_Emphasis">حضور ﷺ کی شمولیت</text:span></text:h>
      <text:p text:style-name="P15">سیرت کی کتب میں یہ بات متفقہ طور پر درج ہے کہ:</text:p>
      <text:p text:style-name="P15"><text:span text:style-name="Strong_20_Emphasis">حضور ﷺ نے اس معاہدے میں نہ صرف شرکت فرمائی، بلکہ عملی طور پر مظلوم کا ساتھ دینے کے لیے تیار کھڑے رہے۔</text:span></text:p>
      <text:p text:style-name="P15"><text:soft-page-break/>آپ ﷺ نے بعد میں فرمایا:</text:p>
      <text:p text:style-name="P15"><text:span text:style-name="Strong_20_Emphasis">"میں عبد اللہ بن جدعان کے گھر میں ایک ایسے معاہدے میں شریک ہوا کہ اگر آج بھی مجھے اسلام کے بعد اس جیسی دعوت دی جائے تو میں ضرور شریک ہوں گا۔"</text:span><text:line-break/>(حوالہ: سیرت ابن ہشام، جلد 1)</text:p>
      <text:p text:style-name="P15">یعنی حضور ﷺ نے اسلام لانے کے بعد بھی فرمایا کہ ایسا عدل و انصاف کا معاہدہ آج ہو تو میں پھر شامل ہوں گا۔</text:p>
      <text:p text:style-name="P15">یہ الفاظ بتاتے ہیں کہ اسلام سے پہلے بھی آپ ﷺ کی فطرت پاکیزہ، عدل پر قائم، اور ظلم کے خلاف مضبوط تھی۔</text:p>
      <text:h text:style-name="P29" text:outline-level="2"><text:span text:style-name="Strong_20_Emphasis">اس معاہدے کی خصوصیات</text:span></text:h>
      <text:p text:style-name="P15">حلفُ الفضول اپنی نوعیت کا منفرد اور انقلابی معاہدہ تھا، کیونکہ اس میں:</text:p>
      <text:list text:style-name="L4">
        <text:list-item>
          <text:p text:style-name="P31"><text:span text:style-name="Strong_20_Emphasis">قبیلے کو نہیں، حق کو معیار بنایا گیا۔</text:span></text:p>
        </text:list-item>
        <text:list-item>
          <text:p text:style-name="P31"><text:span text:style-name="Strong_20_Emphasis">طاقتور کے ظلم کو چیلنج کیا گیا۔</text:span></text:p>
        </text:list-item>
        <text:list-item>
          <text:p text:style-name="P31"><text:span text:style-name="Strong_20_Emphasis">کمزور، مسافر اور غیر قریشی کی بھی مدد کی گئی۔</text:span></text:p>
        </text:list-item>
        <text:list-item>
          <text:p text:style-name="P31"><text:span text:style-name="Strong_20_Emphasis">عدل کو مذہب اور نسب سے بلند رکھا گیا۔</text:span></text:p>
        </text:list-item>
      </text:list>
      <text:p text:style-name="P15"><text:soft-page-break/>جاہلیت کے دور میں ایسا تصور بھی نہ تھا کہ مختلف قبائل کے لوگ مل کر ایک مظلوم کے لیے ظالم کے خلاف کھڑے ہوں۔ حضور ﷺ نے اس میں شرکت کر کے پوری انسانیت کے لیے مثال قائم کر دی۔</text:p>
      <text:h text:style-name="P32" text:outline-level="1"><text:span text:style-name="Strong_20_Emphasis">کسبِ معاش</text:span></text:h>
      <text:p text:style-name="P15">حضور نبی اکرم ﷺ کی حیاتِ طیبہ کا ایک روشن پہلو آپ ﷺ کی محنت، دیانت اور حلال کمائی کا اہتمام ہے۔ آپ ﷺ نے نوجوانی ہی سے رزق کی طلب کے لیے محنت کو اپنا شعار بنایا۔ آپ ﷺ نے کبھی ہاتھ پھیلانا پسند نہیں کیا بلکہ ہمیشہ خود اپنے بازوؤں کی کمائی سے زندگی گزاری۔ یہ سبق بھی اُمت کے لیے چھوڑا کہ عزت و وقار کے ساتھ محنت کر کے حلال روزی کمانی چاہیے۔</text:p>
      <text:h text:style-name="P33" text:outline-level="2"><text:span text:style-name="Strong_20_Emphasis">ابتدائی زمانے میں کسبِ معاش</text:span></text:h>
      <text:p text:style-name="P15">حضور ﷺ نے کم سنی کے زمانے میں بکریاں چرائیں۔ سیرت کی معتبر کتابوں میں آتا ہے کہ مکہ میں ہر نبی نے بکریاں چرائیں اور حضور ﷺ نے بھی اہلِ مکہ کی بکریاں معمولی اُجرت پر چرائیں۔ اس سے یہ بات ثابت ہوتی ہے کہ آپ ﷺ نے بچپن ہی میں حلال کمائی کی بنیاد پر زندگی شروع فرمائی اور رزق کے لیے خود کوشش کو لازم سمجھا۔</text:p>
      <text:h text:style-name="P33" text:outline-level="2"><text:span text:style-name="Strong_20_Emphasis">تجارت کا پیشہ</text:span></text:h>
      <text:p text:style-name="P15">جب آپ ﷺ جوان ہوئے تو تجارت کو اپنا ذریعہ معاش بنایا۔ آپ ﷺ کی دیانت، سچائی اور وعدہ پورا کرنے کی خوبیوں نے آپ ﷺ کو دوسرے تاجروں سے ممتاز کر دیا تھا۔ آپ ﷺ کے معاملہ <text:soft-page-break/>فہمی، کاروباری بصیرت، شفاف لین دین اور حسنِ اخلاق نے بڑے تاجروں کو بھی آپ ﷺ کی طرف متوجہ کر دیا۔</text:p>
      <text:p text:style-name="P15">قریشی معاشرہ میں اس دور کا سب سے قابلِ اعتماد تاجر آپ ﷺ ہی کو سمجھا جاتا تھا۔ اسی دیانت اور امانت کے باعث سیدہ خدیجہ رضی اللہ عنہا نے بھی آپ ﷺ کو اپنا تجارتی سرمایہ سپرد کیا۔ آپ ﷺ نے ان کا سامان تجارت کامیابی کے ساتھ بیرونِ ملک پہنچایا، بہترین منافع کمایا اور پورے اعتماد کے ساتھ واپس لوٹے۔ اس سفر نے آپ ﷺ کی شہرت اور اعتماد میں مزید اضافہ کیا۔</text:p>
      <text:h text:style-name="P33" text:outline-level="2"><text:span text:style-name="Strong_20_Emphasis">دیانت اور امانت کا معیار</text:span></text:h>
      <text:p text:style-name="P15">آپ ﷺ نے اپنے تجارتی سفر میں ہمیشہ سچائی کو اختیار کیا۔ کبھی غلط بیانی، دھوکے، کم ماپ تول یا جھوٹی قسم سے رزق بڑھانے کی کوشش نہیں کی۔ آپ ﷺ فرمایا کرتے تھے کہ جو شخص تجارت میں سچائی اور امانت کو اختیار کرے وہ انبیاء اور صدیقین کے ساتھ ہو گا۔ اس سے اندازہ ہوتا ہے کہ آپ ﷺ نے کسبِ معاش کو محض دنیاوی ضرورت نہیں سمجھا بلکہ اسے ایک اخلاقی اور ایمانی ذمہ داری بنایا۔</text:p>
      <text:h text:style-name="P33" text:outline-level="2"><text:span text:style-name="Strong_20_Emphasis">محنت کی فضیلت</text:span></text:h>
      <text:p text:style-name="P15">اسلام میں محنت کو بہت عظمت حاصل ہے۔ آپ ﷺ نے غلامی، سوال، بھیک اور سہل پسندی کو ناپسند فرمایا اور محنت کر کے کھانے والے کو اللہ کا دوست قرار دیا۔ آپ ﷺ کے ارشادات میں ملتا <text:soft-page-break/>ہے کہ جو شخص اپنے ہاتھ کی کمائی کھاتا ہے، اللہ کے نزدیک سب سے بہتر کھانے والا وہی ہے۔ اس تعلیم نے مسلمانوں میں عزت کے ساتھ محنت کرنے کا شوق پیدا کیا۔</text:p>
      <text:h text:style-name="P33" text:outline-level="2"><text:span text:style-name="Strong_20_Emphasis">بعثت کے بعد بھی کسبِ معاش کی تعلیم</text:span></text:h>
      <text:p text:style-name="P15">نبوت ملنے کے بعد آپ ﷺ نے باقاعدہ تجارت نہ کی، لیکن محنت اور حلال روزی کی تعلیم پوری قوت کے ساتھ دی۔ آپ ﷺ نے فرمایا کہ آسمان سے سونے چاندی کی بارش بھی ہو جائے تو بھی انسان کو ہاتھ کی کمائی سے بہتر رزق نہیں مل سکتا۔ اس لیے آپ ﷺ نے امت کو یہ درس دیا کہ دوسروں پر بوجھ بننے کے بجائے اپنے قدموں پر کھڑا ہونا سب سے بڑا مقام ہے۔</text:p>
      <text:h text:style-name="P33" text:outline-level="2"><text:span text:style-name="Strong_20_Emphasis">کسبِ معاش کے بنیادی اصول</text:span></text:h>
      <text:p text:style-name="P15">حضور ﷺ نے اپنے عمل اور تعلیمات سے مسلمانوں کو رزقِ حلال کے یہ اصول بتائے:</text:p>
      <text:list text:style-name="L5">
        <text:list-item>
          <text:p text:style-name="P34">رزق اللہ کے ہاتھ میں ہے مگر کوشش انسان کی ذمہ داری ہے</text:p>
        </text:list-item>
        <text:list-item>
          <text:p text:style-name="P34">محنت کو عزت اور سوال کو ذلت قرار دیا</text:p>
        </text:list-item>
        <text:list-item>
          <text:p text:style-name="P34">تاجروں کو سچائی، امانت اور عدل کی پابندی کا حکم دیا</text:p>
        </text:list-item>
        <text:list-item>
          <text:p text:style-name="P34">دھوکے، جھوٹ، ملاوٹ اور جھوٹی قسم کو سختی سے منع کیا</text:p>
        </text:list-item>
        <text:list-item>
          <text:p text:style-name="P34">رزق پاکیزہ اور صاف طریقے سے کمانے کی ترغیب دی</text:p>
        </text:list-item>
      </text:list>
      <text:h text:style-name="P33" text:outline-level="2"><text:soft-page-break/><text:span text:style-name="Strong_20_Emphasis"/></text:h>
      <text:p text:style-name="P35"><text:span text:style-name="Strong_20_Emphasis"/></text:p>
      <text:p text:style-name="P35"><text:span text:style-name="Strong_20_Emphasis"/></text:p>
      <text:h text:style-name="P32" text:outline-level="1"><text:span text:style-name="Strong_20_Emphasis">سفر و تجارت</text:span></text:h>
      <text:p text:style-name="P15">حضور نبی اکرم ﷺ کی زندگی کا ایک نہایت روشن اور نمایاں پہلو آپ ﷺ کے سفر اور تجارت کے وہ انداز ہیں جنہوں نے عرب معاشرے میں دیانت، سچائی اور اخلاقی پاکیزگی کی نئی مثالیں قائم کیں۔ آپ ﷺ نے جوانی سے ہی رزقِ حلال کی خاطر سفر اختیار کیا اور تجارت کو اپنا ذریعہ معاش بنایا۔ ان سفروں نے نہ صرف آپ ﷺ کے تجربات میں اضافہ کیا بلکہ آپ ﷺ کی سیرتِ پاک کو دنیا کے مختلف خطوں کے لوگوں کے سامنے روشن کر دیا۔</text:p>
      <text:h text:style-name="P33" text:outline-level="2"><text:span text:style-name="Strong_20_Emphasis">ابتدائی دور کے تجارتی سفر</text:span></text:h>
      <text:p text:style-name="P15">مکہ مکرمہ چونکہ ایک تجارتی مرکز تھا، اس لیے اہلِ قریش تجارت کے لیے دور دراز علاقوں کے سفر کیا کرتے تھے۔ حضور ﷺ نے جب شعور کی عمر میں قدم رکھا تو آپ ﷺ نے بھی انہی تجارتی قافلوں کے ساتھ سفر شروع کیا۔ روایتوں میں آتا ہے کہ آپ ﷺ نے اپنے چچا ابو طالب کے ساتھ کم عمری میں شام کا سفر کیا۔ اس سفری تجربے نے آپ ﷺ کی نگاہ میں وسعت، طرزِ معاشرت کا شعور اور مختلف اقوام کے رہن سہن کا ادراک پیدا کیا۔</text:p>
      <text:p text:style-name="P15"><text:soft-page-break/>یہ سفر عرب نوجوانوں کے لیے عام بات تھی، لیکن حضور ﷺ کی بردباری، خاموشی، وقار اور نرم مزاجی نے آپ ﷺ کو دیگر مسافروں سے ممتاز کر دیا تھا۔</text:p>
      <text:h text:style-name="P33" text:outline-level="2"><text:span text:style-name="Strong_20_Emphasis">تجارت میں صداقت اور دیانت</text:span></text:h>
      <text:p text:style-name="P15">جب آپ ﷺ نے باقاعدہ تجارت شروع کی تو آپ ﷺ کی سچائی اور امانت نے مکہ کے بڑے تاجروں کا اعتماد حاصل کر لیا۔ آپ ﷺ کبھی جھوٹ نہ بولتے، نہ جھوٹی قسم کھاتے، نہ نقصدار سامان چھپاتے۔ آپ ﷺ نے ہمیشہ شفاف لین دین کیا۔ اسی وجہ سے آپ ﷺ کو <text:span text:style-name="Strong_20_Emphasis">امین</text:span> اور <text:span text:style-name="Strong_20_Emphasis">صادق</text:span> کے القابات دیے گئے۔</text:p>
      <text:p text:style-name="P15">تجارتی قافلوں میں سفر لمبا، تھکا دینے والا اور کئی خطرات سے بھرا ہوتا تھا۔ لیکن آپ ﷺ نے ہر سفر میں دیانت کو اپنا معیار رکھا۔ سفر کے دوران کیے گئے معاہدے، وعدے اور لین دین میں آپ ﷺ کبھی معمولی بھی خلاف ورزی نہیں کرتے تھے۔ یہی وجہ تھی کہ آپ ﷺ کا نام پورے حجاز میں بھروسے کی علامت بن گیا۔</text:p>
      <text:h text:style-name="P33" text:outline-level="2"><text:span text:style-name="Strong_20_Emphasis">سیدہ خدیجہ رضی اللہ عنہا کا سرمایۂ تجارت</text:span></text:h>
      <text:p text:style-name="P15">آپ ﷺ کی دیانت داری کو دیکھ کر سیدہ خدیجہ رضی اللہ عنہا نے آپ ﷺ کو اپنا تجارتی سامان کے ساتھ مکہ سے شام کی طرف سفر پر بھیجا۔ آپ ﷺ نے یہ سفر نہایت کامیابی سے طے کیا، بہترین منافع حاصل کیا اور مکمل امانت داری سے ہر چیز واپس پہنچا دی۔ اس سفر میں آپ ﷺ نے تجارت کے <text:soft-page-break/>اصولوں کو اس قدر خوبصورتی سے نبھایا کہ سیدہ خدیجہ رضی اللہ عنہا نے آپ ﷺ کی اعلیٰ اخلاقی عظمت کا اعتراف فرمایا۔</text:p>
      <text:h text:style-name="P32" text:outline-level="1"><text:span text:style-name="Strong_20_Emphasis">سیدہ خدیجہ رضی اللہ عنہا سے نکاح</text:span></text:h>
      <text:p text:style-name="P15">حضور نبی اکرم ﷺ اور سیدہ خدیجہ رضی اللہ عنہا کا نکاح اسلامی تاریخ کی عظیم ترین اور بابرکت شادیوں میں سے ایک تھا۔ یہ نکاح نہ صرف محبت، اعتماد اور پاکیزگی کی بنیاد پر قائم ہوا بلکہ اس نے نبوت کے عظیم مشن کی تیاری میں بھی مرکزی کردار ادا کیا۔ اس رشتے کی پاکیزگی، وفاداری اور قربانیوں نے پوری امت کے لیے ایک عظیم نمونہ چھوڑا ہے۔</text:p>
      <text:h text:style-name="P33" text:outline-level="2"><text:span text:style-name="Strong_20_Emphasis">سیدہ خدیجہ رضی اللہ عنہا کا مقام</text:span></text:h>
      <text:p text:style-name="P15">سیدہ خدیجہ رضی اللہ عنہا کو مکہ میں “طاہرہ” کے لقب سے یاد کیا جاتا تھا۔ آپ اعلیٰ نسب، پاکیزہ کردار اور بہترین اخلاق کی مالک تھیں۔ تجارت کے میدان میں آپ کا مقام نہایت بلند تھا۔ دیانت داری اور سخاوت کے باعث اہلِ مکہ آپ کی مثال دیتے تھے۔ آپ نہ صرف ایک کامیاب تاجر تھیں بلکہ عقل و فہم میں بھی بے مثال تھیں۔</text:p>
      <text:h text:style-name="P33" text:outline-level="2"><text:span text:style-name="Strong_20_Emphasis">نکاح کا پس منظر</text:span></text:h>
      <text:p text:style-name="P15">جب حضور ﷺ نے دیانت اور صداقت کے ساتھ تجارت کی اور شام کے سفر سے نہایت امانت داری کے ساتھ واپس تشریف لائے تو سیدہ خدیجہ رضی اللہ عنہا آپ ﷺ کے اخلاقِ عالیہ سے بے حد متاثر <text:soft-page-break/>ہوئیں۔ آپ نے اپنے غلام میسرہ سے بھی حضور ﷺ کے حسنِ سلوک، بردباری اور کردار کے بارے میں سنا۔ ان تمام باتوں نے سیدہ خدیجہ رضی اللہ عنہا کے دل میں آپ ﷺ کے لیے احترام اور محبت کے جذبات پیدا کیے۔</text:p>
      <text:p text:style-name="P15">چنانچہ سیدہ خدیجہ رضی اللہ عنہا نے اپنی خالہ کے ذریعے نکاح کی خواہش ظاہر کی۔ اس وقت حضور ﷺ کی عمر پچیس برس اور سیدہ خدیجہ رضی اللہ عنہا کی عمر چالیس برس تھی۔ عمر کا فرق اس نکاح کی پاکیزگی اور اللہ کی رضا کا سب سے بڑا ثبوت ہے، کیونکہ یہ رشتہ دنیاوی مصلحتوں پر نہیں بلکہ کردار، ایمان داری اور باطنی عظمت پر قائم ہوا تھا۔</text:p>
      <text:h text:style-name="P33" text:outline-level="2"><text:span text:style-name="Strong_20_Emphasis">نکاح کی تقریب</text:span></text:h>
      <text:p text:style-name="P15">نکاح کی تقریب نہایت سادگی اور احترام کے ساتھ منعقد ہوئی۔ حضور ﷺ کے چچا ابو طالب نے نکاح کا خطبہ پڑھا، جس میں آپ ﷺ کی شان، خاندانِ ہاشم کی عظمت اور سیدہ خدیجہ رضی اللہ عنہا کے مقام کا تذکرہ کیا گیا۔<text:line-break/>نکاح کی رقم بھی مقرر ہوئی اور خاندان کے بزرگوں نے خوشی اور مسرت کے ساتھ اس بابرکت رشتے کو قبول کیا۔</text:p>
      <text:p text:style-name="P36">اس نکاح نے دونوں خاندانوں کو محبت، احترام اور خیر خواہی کے بندھن میں باندھ دیا۔ سیدہ خدیجہ رضی اللہ عنہا نے حضور ﷺ کے گھر کو سکون، محبت اور وقار سے بھر دیا۔</text:p>
      <text:p text:style-name="P36"><text:soft-page-break/><text:span text:style-name="Strong_20_Emphasis">سیدہ خدیجہ رضی اللہ عنہا کی وفاداری اور قربانی</text:span></text:p>
      <text:p text:style-name="P15">نکاح کے بعد سیدہ خدیجہ رضی اللہ عنہا نے اپنے تمام مال، وسائل اور محبت کو حضور ﷺ کے نام وقف کر دیا۔ جب حضور ﷺ پر پہلی وحی نازل ہوئی اور آپ ﷺ گھر واپس تشریف لائے، تو سب سے پہلے سیدہ خدیجہ رضی اللہ عنہا ہی نے آپ ﷺ کو تسلی دی۔<text:line-break/>آپ نے فرمایا:</text:p>
      <text:p text:style-name="P15"><text:span text:style-name="Strong_20_Emphasis">“اللہ آپ کو کبھی رسوا نہیں کرے گا، آپ یتیموں کے والی، غریبوں کے ہمدرد اور مظلوموں کے مددگار ہیں۔”</text:span></text:p>
      <text:p text:style-name="P15">یہ وہ لمحہ تھا جب دنیا کی پہلی مومنہ نے رسولِ اکرم ﷺ کا ساتھ دیا۔<text:line-break/>نبوت کے ابتدائی مشکل دور میں سیدہ خدیجہ رضی اللہ عنہا نے اپنے مال سے اسلام کی مدد کی، اپنے دل سے نبی ﷺ کی دلجوئی کی، اور اپنے گھر کو امن و محبت کا مرکز بنایا۔</text:p>
      <text:p text:style-name="P15"><text:s/>حضور ﷺ فرمایا کرتے تھے کہ:</text:p>
      <text:p text:style-name="P15"/>
      <text:p text:style-name="P15"><text:span text:style-name="Strong_20_Emphasis">“خدیجہ نے اس وقت میرا ساتھ دیا جب لوگ میرا انکار کرتے تھے، اور اپنے مال سے میری مدد کی جب لوگوں نے مجھے محروم رکھا।”</text:span></text:p>
      <text:p text:style-name="P15">یہ جملہ سیدہ خدیجہ رضی اللہ عنہا کے مقام اور ان کی عظیم قربانیوں کا خلاصہ ہے۔</text:p>
      <text:p text:style-name="P35"><text:soft-page-break/><text:span text:style-name="Strong_20_Emphasis"/></text:p>
      <text:p text:style-name="P35"><text:span text:style-name="Strong_20_Emphasis"/></text:p>
      <text:p text:style-name="P35"><text:span text:style-name="Strong_20_Emphasis"/></text:p>
      <text:h text:style-name="P32" text:outline-level="1"><text:span text:style-name="Strong_20_Emphasis">حوالہ جات</text:span></text:h>
      <text:p text:style-name="P15">١۔ <text:span text:style-name="Strong_20_Emphasis">حضور ﷺ کی معاشرتی سرگرمیوں کا تعارف</text:span></text:p>
      <text:list text:style-name="L6">
        <text:list-item>
          <text:p text:style-name="P37">سیرت ابن ہشام</text:p>
        </text:list-item>
        <text:list-item>
          <text:p text:style-name="P37">زاد المعاد — ابن القیم</text:p>
        </text:list-item>
        <text:list-item>
          <text:p text:style-name="P37">الرحیق المختوم</text:p>
        </text:list-item>
        <text:list-item>
          <text:p text:style-name="P37">البدایہ والنہایہ — ابن کثیر</text:p>
        </text:list-item>
      </text:list>
      <text:p text:style-name="P15">٢۔ <text:span text:style-name="Strong_20_Emphasis">معرکۂ فِجار میں شرکت</text:span></text:p>
      <text:list text:style-name="L7">
        <text:list-item>
          <text:p text:style-name="P38">سیرت ابن ہشام (جلد ١)</text:p>
        </text:list-item>
        <text:list-item>
          <text:p text:style-name="P38">طبقات ابن سعد</text:p>
        </text:list-item>
        <text:list-item>
          <text:p text:style-name="P38">البدایہ والنہایہ — ابن کثیر</text:p>
        </text:list-item>
        <text:list-item>
          <text:p text:style-name="P38">دلائل النبوۃ — امام بیہقی</text:p>
        </text:list-item>
      </text:list>
      <text:p text:style-name="P15"><text:soft-page-break/>٣۔ <text:span text:style-name="Strong_20_Emphasis">حلفُ الفضول میں شمولیت</text:span></text:p>
      <text:list text:style-name="L8">
        <text:list-item>
          <text:p text:style-name="P39">سیرت ابن ہشام (باب حلف الفضول)</text:p>
        </text:list-item>
        <text:list-item>
          <text:p text:style-name="P39">طبقات ابن سعد</text:p>
        </text:list-item>
        <text:list-item>
          <text:p text:style-name="P39">المستدرک — حاکم</text:p>
        </text:list-item>
        <text:list-item>
          <text:p text:style-name="P39">الرحیق المختوم</text:p>
        </text:list-item>
        <text:list-item>
          <text:p text:style-name="P39">البدایہ والنہایہ</text:p>
        </text:list-item>
      </text:list>
      <text:p text:style-name="P15">٤۔ <text:span text:style-name="Strong_20_Emphasis">کسبِ معاش</text:span></text:p>
      <text:list text:style-name="L9">
        <text:list-item>
          <text:p text:style-name="P40">سیرت ابن ہشام (باب شباب رسول اللہ)</text:p>
        </text:list-item>
        <text:list-item>
          <text:p text:style-name="P40">طبقات ابن سعد (باب تجارت النبی)</text:p>
        </text:list-item>
        <text:list-item>
          <text:p text:style-name="P40">صحیح بخاری (کتاب الاجارہ)</text:p>
        </text:list-item>
        <text:list-item>
          <text:p text:style-name="P40">مشکوٰۃ شریف (باب کسب حلال)</text:p>
        </text:list-item>
      </text:list>
      <text:p text:style-name="P15">٥۔ <text:span text:style-name="Strong_20_Emphasis">سفر و تجارت</text:span></text:p>
      <text:list text:style-name="L10">
        <text:list-item>
          <text:p text:style-name="P41">سیرت ابن ہشام (سفر شام)</text:p>
        </text:list-item>
        <text:list-item>
          <text:p text:style-name="P41">طبقات ابن سعد (سفر الشام)</text:p>
        </text:list-item>
        <text:list-item>
          <text:p text:style-name="P41"><text:soft-page-break/>دلائل النبوۃ — امام بیہقی</text:p>
        </text:list-item>
        <text:list-item>
          <text:p text:style-name="P41">الرحیق المختوم</text:p>
        </text:list-item>
        <text:list-item>
          <text:p text:style-name="P41">البدایہ والنہایہ</text:p>
        </text:list-item>
      </text:list>
      <text:p text:style-name="P15">٦۔ <text:span text:style-name="Strong_20_Emphasis">سیدہ خدیجہ رضی اللہ عنہا سے نکاح</text:span></text:p>
      <text:list text:style-name="L11">
        <text:list-item>
          <text:p text:style-name="P42">سیرت ابن ہشام (باب نکاح النبی ﷺ)</text:p>
        </text:list-item>
        <text:list-item>
          <text:p text:style-name="P42">طبقات ابن سعد (ذکر ازواج النبی)</text:p>
        </text:list-item>
        <text:list-item>
          <text:p text:style-name="P42">البدایہ والنہایہ</text:p>
        </text:list-item>
        <text:list-item>
          <text:p text:style-name="P42">الکامل فی التاریخ — ابن اثیر</text:p>
        </text:list-item>
        <text:list-item>
          <text:p text:style-name="P42">الشفاء — قاضی عیاض</text:p>
        </text:list-item>
        <text:list-item>
          <text:p text:style-name="P42">الرحیق المختوم</text:p>
        </text:list-item>
      </text:list>
      <text:p text:style-name="P35"><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erif" svg:font-family="FreeSerif" style:font-family-generic="roman"/>
    <style:font-face style:name="FreeSerif1" svg:font-family="FreeSerif"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Nastaliq Urdu" svg:font-family="'Noto Nastaliq Urdu'"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erif1" style:font-size-complex="12pt" style:language-complex="ur" style:country-complex="PK"/>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erif1" style:font-size-complex="12pt" style:language-complex="ur" style:country-complex="PK"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erif1" style:font-family-complex="FreeSerif"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erif1" style:font-family-complex="FreeSerif"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erif1" style:font-family-complex="FreeSerif"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erif1" style:font-family-complex="FreeSerif" style:font-family-generic-complex="system" style:font-pitch-complex="variable" style:font-size-complex="10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erif1" style:font-family-complex="FreeSerif"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١, ٢, ٣, ..."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4"/><text:page-number text:select-page="current">٢٢</text:page-number><text:bookmark-end text:name="PageNumWizard_FOOTER_Default Page Style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6T01:13:37.759875581</meta:creation-date>
    <meta:print-date>2025-12-06T02:58:03.656174627</meta:print-date>
    <meta:printed-by>PDF files</meta:printed-by>
    <dc:date>2025-12-06T02:58:13.443691390</dc:date>
    <meta:editing-duration>PT9S</meta:editing-duration>
    <meta:editing-cycles>1</meta:editing-cycles>
    <meta:document-statistic meta:table-count="1" meta:image-count="0" meta:object-count="0" meta:page-count="22" meta:paragraph-count="183" meta:word-count="3465" meta:character-count="15434" meta:non-whitespace-character-count="12161"/>
    <meta:generator>LibreOffice/25.8.3.2$Linux_X86_64 LibreOffice_project/580$Build-2</meta:generator>
  </office:meta>
</office:document-meta>
</file>